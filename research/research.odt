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T1" style:family="text">
      <style:text-properties fo:font-size="22pt" fo:background-color="#ff0000" loext:char-shading-value="0" style:font-size-asian="22pt" style:font-size-complex="2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P1"><text:span text:style-name="Strong_20_Emphasis"><text:span text:style-name="T1">PROs/CONs</text:span></text:span></text:p>
      <text:p text:style-name="Text_20_body"><text:span text:style-name="Strong_20_Emphasis"/></text:p>
      <text:p text:style-name="Text_20_body"><text:span text:style-name="Strong_20_Emphasis">ONBOARDING &amp; VERIFICATION</text:span></text:p>
      <text:p text:style-name="Text_20_body"><text:span text:style-name="Strong_20_Emphasis">TASKRABBIT</text:span></text:p>
      <text:list text:style-name="L1">
        <text:list-item>
          <text:p text:style-name="P2"><text:span text:style-name="Emphasis">Clients:</text:span> Easy sign-up, no identity verification for clients. TaskRabbit does not vet customers.</text:p>
        </text:list-item>
        <text:list-item>
          <text:p text:style-name="P2"><text:span text:style-name="Emphasis">Providers:</text:span> Strict vetting (ID + background check with $25 fee), but no skill certification beyond basic checks.</text:p>
        </text:list-item>
        <text:list-item>
          <text:p text:style-name="P2"><text:span text:style-name="Emphasis">Pros:</text:span> Fast for clients, trusted providers.</text:p>
        </text:list-item>
        <text:list-item>
          <text:p text:style-name="P2"><text:span text:style-name="Emphasis">Cons:</text:span> No skill verification or client trust layer.</text:p>
        </text:list-item>
        <text:list-item>
          <text:p text:style-name="P2"><text:span text:style-name="Emphasis">Opportunities:</text:span> Add client ID checks, skill badges, and onboarding certifications.</text:p>
        </text:list-item>
      </text:list>
      <text:p text:style-name="Text_20_body"><text:span text:style-name="Strong_20_Emphasis">THUMBTACK</text:span></text:p>
      <text:list text:style-name="L2">
        <text:list-item>
          <text:p text:style-name="P3"><text:span text:style-name="Emphasis">Clients:</text:span> Simple sign-up, no formal ID verification.</text:p>
        </text:list-item>
        <text:list-item>
          <text:p text:style-name="P3"><text:span text:style-name="Emphasis">Providers:</text:span> Quick profile setup, no mandatory background checks (optional checks for a badge). Trust relies on reviews rather than upfront vetting.</text:p>
        </text:list-item>
        <text:list-item>
          <text:p text:style-name="P3"><text:span text:style-name="Emphasis">Pros:</text:span> Fast onboarding; low entry barrier for pros.</text:p>
        </text:list-item>
        <text:list-item>
          <text:p text:style-name="P3"><text:span text:style-name="Emphasis">Cons:</text:span> Weak vetting for both sides; risk of spam/fake leads.</text:p>
        </text:list-item>
        <text:list-item>
          <text:p text:style-name="P3"><text:span text:style-name="Emphasis">Opportunities:</text:span> Require lightweight ID verification and enforce more proactive screening.</text:p>
        </text:list-item>
      </text:list>
      <text:p text:style-name="Text_20_body"><text:span text:style-name="Strong_20_Emphasis">URBAN COMPANY</text:span></text:p>
      <text:list text:style-name="L3">
        <text:list-item>
          <text:p text:style-name="P4"><text:span text:style-name="Emphasis">Clients:</text:span> OTP-based sign-up, no detailed identity checks.</text:p>
        </text:list-item>
        <text:list-item>
          <text:p text:style-name="P4"><text:span text:style-name="Emphasis">Providers:</text:span> Rigorous onboarding including identity checks, background verification, and category-specific training. High entry barrier with strict performance monitoring.</text:p>
        </text:list-item>
        <text:list-item>
          <text:p text:style-name="P4"><text:span text:style-name="Emphasis">Pros:</text:span> High service consistency; safe for clients.</text:p>
        </text:list-item>
        <text:list-item>
          <text:p text:style-name="P4"><text:span text:style-name="Emphasis">Cons:</text:span> Entry barrier for providers; no client vetting.</text:p>
        </text:list-item>
        <text:list-item>
          <text:p text:style-name="P4"><text:span text:style-name="Emphasis">Opportunities:</text:span> Add client safety layer; create a fast-track onboarding variant for qualified pros.</text:p>
        </text:list-item>
      </text:list>
      <text:p text:style-name="Text_20_body"><text:span text:style-name="Strong_20_Emphasis">HOUSECALL PRO</text:span></text:p>
      <text:list text:style-name="L4">
        <text:list-item>
          <text:p text:style-name="P5"><text:span text:style-name="Emphasis">Clients:</text:span> Not applicable—no public marketplace. Clients interact through individual businesses.</text:p>
        </text:list-item>
        <text:list-item>
          <text:p text:style-name="P5"><text:span text:style-name="Emphasis">Providers:</text:span> Simple software sign-up for service businesses. No vetting or identity checks. Relies on external reputation; businesses must bring their own clients.</text:p>
        </text:list-item>
        <text:list-item>
          <text:p text:style-name="P5"><text:soft-page-break/><text:span text:style-name="Emphasis">Pros:</text:span> Zero friction setup for pros.</text:p>
        </text:list-item>
        <text:list-item>
          <text:p text:style-name="P5"><text:span text:style-name="Emphasis">Cons:</text:span> No trust layer; depends entirely on third-party validation.</text:p>
        </text:list-item>
        <text:list-item>
          <text:p text:style-name="P5"><text:span text:style-name="Emphasis">Opportunities:</text:span> Offer optional verification layers or trust-badges for HCP users.</text:p>
        </text:list-item>
      </text:list>
      <text:p text:style-name="Text_20_body"><text:span text:style-name="Strong_20_Emphasis">MOWSNOWPROS</text:span></text:p>
      <text:list text:style-name="L5">
        <text:list-item>
          <text:p text:style-name="P6">• <text:span text:style-name="Strong_20_Emphasis">Pros:</text:span> Fast onboarding for contractors; no red tape.</text:p>
        </text:list-item>
        <text:list-item>
          <text:p text:style-name="P6">• <text:span text:style-name="Strong_20_Emphasis">Cons:</text:span> No background checks, licensing, or ID verification for providers.</text:p>
        </text:list-item>
        <text:list-item>
          <text:p text:style-name="P6">• <text:span text:style-name="Strong_20_Emphasis">Opportunities:</text:span> Add optional skill certification, background vetting, and client-side account scoring.</text:p>
        </text:list-item>
      </text:list>
      <text:p text:style-name="Text_20_body"><text:span text:style-name="Strong_20_Emphasis">THEBESTCALGARY.COM</text:span></text:p>
      <text:list text:style-name="L6">
        <text:list-item>
          <text:p text:style-name="P7">• <text:span text:style-name="Strong_20_Emphasis">Pros:</text:span> Editorially vetted companies based on offline research.</text:p>
        </text:list-item>
        <text:list-item>
          <text:p text:style-name="P7">• <text:span text:style-name="Strong_20_Emphasis">Cons:</text:span> No formal onboarding, no real-time updates, or verification system.</text:p>
        </text:list-item>
        <text:list-item>
          <text:p text:style-name="P7">• <text:span text:style-name="Strong_20_Emphasis">Opportunities:</text:span> Create a live verification pipeline or editor scorecard with third-party data validation.</text:p>
        </text:list-item>
      </text:list>
      <text:p text:style-name="Text_20_body"/>
      <text:p text:style-name="Text_20_body"><text:span text:style-name="Strong_20_Emphasis">SERVICE DISCOVERY &amp; FILTERING</text:span></text:p>
      <text:p text:style-name="Text_20_body"><text:span text:style-name="Strong_20_Emphasis">TASKRABBIT</text:span></text:p>
      <text:list text:style-name="L7">
        <text:list-item>
          <text:p text:style-name="P8"><text:span text:style-name="Emphasis">Clients:</text:span> Limited to predefined task categories; minimal filters. No keyword search or skill tags.</text:p>
        </text:list-item>
        <text:list-item>
          <text:p text:style-name="P8"><text:span text:style-name="Emphasis">Providers:</text:span> Must work within fixed categories. Cannot list niche or professional services.</text:p>
        </text:list-item>
        <text:list-item>
          <text:p text:style-name="P8"><text:span text:style-name="Emphasis">Pros:</text:span> Simple task flow; low friction for common tasks.</text:p>
        </text:list-item>
        <text:list-item>
          <text:p text:style-name="P8"><text:span text:style-name="Emphasis">Cons:</text:span> Rigid categories; no flexibility for niche services.</text:p>
        </text:list-item>
        <text:list-item>
          <text:p text:style-name="P8"><text:span text:style-name="Emphasis">Opportunities:</text:span> Add skill tagging, keyword filters, and niche support listings.</text:p>
        </text:list-item>
      </text:list>
      <text:p text:style-name="Text_20_body"><text:span text:style-name="Strong_20_Emphasis">THUMBTACK</text:span></text:p>
      <text:list text:style-name="L8">
        <text:list-item>
          <text:p text:style-name="P9"><text:span text:style-name="Emphasis">Clients:</text:span> Wide service range but lacks instant match or robust filters. Browsing and comparison is manual.</text:p>
        </text:list-item>
        <text:list-item>
          <text:p text:style-name="P9"><text:span text:style-name="Emphasis">Providers:</text:span> Limited control over matching. Auto-matching may deliver low-quality or irrelevant leads.</text:p>
        </text:list-item>
        <text:list-item>
          <text:p text:style-name="P9"><text:span text:style-name="Emphasis">Pros:</text:span> Huge service variety.</text:p>
        </text:list-item>
        <text:list-item>
          <text:p text:style-name="P9"><text:span text:style-name="Emphasis">Cons:</text:span> No real-time discovery; overwhelming results.</text:p>
        </text:list-item>
        <text:list-item>
          <text:p text:style-name="P9"><text:span text:style-name="Emphasis">Opportunities:</text:span> Introduce smart filters, match quality metrics, and instant booking modules.</text:p>
        </text:list-item>
      </text:list>
      <text:p text:style-name="Text_20_body"><text:span text:style-name="Strong_20_Emphasis">URBAN COMPANY</text:span></text:p>
      <text:list text:style-name="L9">
        <text:list-item>
          <text:p text:style-name="P10"><text:soft-page-break/><text:span text:style-name="Emphasis">Clients:</text:span> Category-driven with fixed menus. No manual selection of pros in most cases.</text:p>
        </text:list-item>
        <text:list-item>
          <text:p text:style-name="P10"><text:span text:style-name="Emphasis">Providers:</text:span> Must operate within UC’s framework. Cannot customize listings or expand scope.</text:p>
        </text:list-item>
        <text:list-item>
          <text:p text:style-name="P10"><text:span text:style-name="Emphasis">Pros:</text:span> Easy for customers to book without thinking.</text:p>
        </text:list-item>
        <text:list-item>
          <text:p text:style-name="P10"><text:span text:style-name="Emphasis">Cons:</text:span> No choice of provider; restricted flexibility.</text:p>
        </text:list-item>
        <text:list-item>
          <text:p text:style-name="P10"><text:span text:style-name="Emphasis">Opportunities:</text:span> Blend fixed menus with optional provider profiles; enhance personalization.</text:p>
        </text:list-item>
      </text:list>
      <text:p text:style-name="Text_20_body"><text:span text:style-name="Strong_20_Emphasis">HOUSECALL PRO</text:span></text:p>
      <text:list text:style-name="L10">
        <text:list-item>
          <text:p text:style-name="P11"><text:span text:style-name="Emphasis">Clients:</text:span> No discovery function. Clients reach businesses directly via web links.</text:p>
        </text:list-item>
        <text:list-item>
          <text:p text:style-name="P11"><text:span text:style-name="Emphasis">Providers:</text:span> No marketplace exposure. Must generate own traffic externally.</text:p>
        </text:list-item>
        <text:list-item>
          <text:p text:style-name="P11"><text:span text:style-name="Emphasis">Pros:</text:span> Full control by provider.</text:p>
        </text:list-item>
        <text:list-item>
          <text:p text:style-name="P11"><text:span text:style-name="Emphasis">Cons:</text:span> No client acquisition support.</text:p>
        </text:list-item>
        <text:list-item>
          <text:p text:style-name="P11"><text:span text:style-name="Emphasis">Opportunities:</text:span> Offer optional discovery portal or lead-gen marketplace layer.</text:p>
        </text:list-item>
      </text:list>
      <text:p text:style-name="Text_20_body"><text:span text:style-name="Strong_20_Emphasis">MOWSNOWPROS</text:span></text:p>
      <text:list text:style-name="L11">
        <text:list-item>
          <text:p text:style-name="P12">• <text:span text:style-name="Strong_20_Emphasis">Pros:</text:span> Job-based location dispatch system is efficient for urgent work.</text:p>
        </text:list-item>
        <text:list-item>
          <text:p text:style-name="P12">• <text:span text:style-name="Strong_20_Emphasis">Cons:</text:span> No provider profiles, filters, or custom matching.</text:p>
        </text:list-item>
        <text:list-item>
          <text:p text:style-name="P12">• <text:span text:style-name="Strong_20_Emphasis">Opportunities:</text:span> Add filters by equipment, language, reliability score, and request-pro options.</text:p>
        </text:list-item>
      </text:list>
      <text:p text:style-name="Text_20_body"><text:span text:style-name="Strong_20_Emphasis">THEBESTCALGARY.COM</text:span></text:p>
      <text:list text:style-name="L12">
        <text:list-item>
          <text:p text:style-name="P13">• <text:span text:style-name="Strong_20_Emphasis">Pros:</text:span> Pre-curated category lists guide readers to top picks.</text:p>
        </text:list-item>
        <text:list-item>
          <text:p text:style-name="P13">• <text:span text:style-name="Strong_20_Emphasis">Cons:</text:span> No interactivity or personalization.</text:p>
        </text:list-item>
        <text:list-item>
          <text:p text:style-name="P13">• <text:span text:style-name="Strong_20_Emphasis">Opportunities:</text:span> Add searchable filters, sort by rating/price/location, and live availability widgets.</text:p>
        </text:list-item>
      </text:list>
      <text:p text:style-name="Text_20_body"/>
      <text:p text:style-name="Text_20_body"><text:span text:style-name="Strong_20_Emphasis">BOOKING &amp; SCHEDULING</text:span></text:p>
      <text:p text:style-name="Text_20_body"><text:span text:style-name="Strong_20_Emphasis">TASKRABBIT</text:span></text:p>
      <text:list text:style-name="L13">
        <text:list-item>
          <text:p text:style-name="P14"><text:span text:style-name="Emphasis">Clients:</text:span> One-off, hourly-based tasks. No recurring or multi-day support.</text:p>
        </text:list-item>
        <text:list-item>
          <text:p text:style-name="P14"><text:span text:style-name="Emphasis">Providers:</text:span> Manual availability. No calendar sync or bundled tasks.</text:p>
        </text:list-item>
        <text:list-item>
          <text:p text:style-name="P14"><text:span text:style-name="Emphasis">Pros:</text:span> Straightforward for single-task booking.</text:p>
        </text:list-item>
        <text:list-item>
          <text:p text:style-name="P14"><text:span text:style-name="Emphasis">Cons:</text:span> Poor for long-term or repeat use.</text:p>
        </text:list-item>
        <text:list-item>
          <text:p text:style-name="P14"><text:span text:style-name="Emphasis">Opportunities:</text:span> Build repeat scheduling, external calendar sync, task bundling.</text:p>
        </text:list-item>
      </text:list>
      <text:p text:style-name="Text_20_body"><text:span text:style-name="Strong_20_Emphasis">THUMBTACK</text:span></text:p>
      <text:list text:style-name="L14">
        <text:list-item>
          <text:p text:style-name="P15"><text:soft-page-break/><text:span text:style-name="Emphasis">Clients:</text:span> No real-time booking. Scheduling handled via chat.</text:p>
        </text:list-item>
        <text:list-item>
          <text:p text:style-name="P15"><text:span text:style-name="Emphasis">Providers:</text:span> No built-in calendar for booking. Coordination is manual.</text:p>
        </text:list-item>
        <text:list-item>
          <text:p text:style-name="P15"><text:span text:style-name="Emphasis">Pros:</text:span> Flexible interaction pre-hire.</text:p>
        </text:list-item>
        <text:list-item>
          <text:p text:style-name="P15"><text:span text:style-name="Emphasis">Cons:</text:span> Time-consuming, informal process.</text:p>
        </text:list-item>
        <text:list-item>
          <text:p text:style-name="P15"><text:span text:style-name="Emphasis">Opportunities:</text:span> Add native calendar &amp; auto-booking post-quote acceptance.</text:p>
        </text:list-item>
      </text:list>
      <text:p text:style-name="Text_20_body"><text:span text:style-name="Strong_20_Emphasis">URBAN COMPANY</text:span></text:p>
      <text:list text:style-name="L15">
        <text:list-item>
          <text:p text:style-name="P16"><text:span text:style-name="Emphasis">Clients:</text:span> Time slots available but one service at a time. No bundling or recurring options.</text:p>
        </text:list-item>
        <text:list-item>
          <text:p text:style-name="P16"><text:span text:style-name="Emphasis">Providers:</text:span> Auto-assignment with limited flexibility. No external calendar support.</text:p>
        </text:list-item>
        <text:list-item>
          <text:p text:style-name="P16"><text:span text:style-name="Emphasis">Pros:</text:span> Fast booking, optimized matching.</text:p>
        </text:list-item>
        <text:list-item>
          <text:p text:style-name="P16"><text:span text:style-name="Emphasis">Cons:</text:span> Providers lose control, no support for recurring workflows.</text:p>
        </text:list-item>
        <text:list-item>
          <text:p text:style-name="P16"><text:span text:style-name="Emphasis">Opportunities:</text:span> Allow job preference rules, recurring services, and advanced coordination.</text:p>
        </text:list-item>
      </text:list>
      <text:p text:style-name="Text_20_body"><text:span text:style-name="Strong_20_Emphasis">HOUSECALL PRO</text:span></text:p>
      <text:list text:style-name="L16">
        <text:list-item>
          <text:p text:style-name="P17"><text:span text:style-name="Emphasis">Clients:</text:span> Book via external business portal. No centralized app.</text:p>
        </text:list-item>
        <text:list-item>
          <text:p text:style-name="P17"><text:span text:style-name="Emphasis">Providers:</text:span> Robust scheduling. Lacks built-in route optimization in base plans.</text:p>
        </text:list-item>
        <text:list-item>
          <text:p text:style-name="P17"><text:span text:style-name="Emphasis">Pros:</text:span> Full calendar control.</text:p>
        </text:list-item>
        <text:list-item>
          <text:p text:style-name="P17"><text:span text:style-name="Emphasis">Cons:</text:span> No automation for job batching, complex scheduling needs external tools.</text:p>
        </text:list-item>
        <text:list-item>
          <text:p text:style-name="P17"><text:span text:style-name="Emphasis">Opportunities:</text:span> Add native route planning, drag-n-drop reordering, shift logic.</text:p>
        </text:list-item>
      </text:list>
      <text:p text:style-name="Text_20_body"><text:span text:style-name="Strong_20_Emphasis">MOWSNOWPROS</text:span></text:p>
      <text:list text:style-name="L17">
        <text:list-item>
          <text:p text:style-name="P18">• <text:span text:style-name="Strong_20_Emphasis">Pros:</text:span> Instant dispatch and automation for recurring jobs.</text:p>
        </text:list-item>
        <text:list-item>
          <text:p text:style-name="P18">• <text:span text:style-name="Strong_20_Emphasis">Cons:</text:span> No scheduled appointments or direct calendar control.</text:p>
        </text:list-item>
        <text:list-item>
          <text:p text:style-name="P18">• <text:span text:style-name="Strong_20_Emphasis">Opportunities:</text:span> Add future booking slots, grouped service days, and integrated calendars.</text:p>
        </text:list-item>
      </text:list>
      <text:p text:style-name="Text_20_body"><text:span text:style-name="Strong_20_Emphasis">THEBESTCALGARY.COM</text:span></text:p>
      <text:list text:style-name="L18">
        <text:list-item>
          <text:p text:style-name="P19">• <text:span text:style-name="Strong_20_Emphasis">Pros:</text:span> Not applicable.</text:p>
        </text:list-item>
        <text:list-item>
          <text:p text:style-name="P19">• <text:span text:style-name="Strong_20_Emphasis">Cons:</text:span> No scheduling, no booking integrations.</text:p>
        </text:list-item>
        <text:list-item>
          <text:p text:style-name="P19">• <text:span text:style-name="Strong_20_Emphasis">Opportunities:</text:span> Add embedded scheduling widgets or redirect to synced provider calendars.</text:p>
        </text:list-item>
      </text:list>
      <text:p text:style-name="Text_20_body"/>
      <text:p text:style-name="Text_20_body"><text:span text:style-name="Strong_20_Emphasis">PRICING MODEL &amp; TRANSPARENCY</text:span></text:p>
      <text:p text:style-name="Text_20_body"><text:span text:style-name="Strong_20_Emphasis">TASKRABBIT</text:span></text:p>
      <text:list text:style-name="L19">
        <text:list-item>
          <text:p text:style-name="P20"><text:soft-page-break/><text:span text:style-name="Emphasis">Clients:</text:span> Hourly pricing. Platform fees not visible until checkout.</text:p>
        </text:list-item>
        <text:list-item>
          <text:p text:style-name="P20"><text:span text:style-name="Emphasis">Providers:</text:span> Set own rates but no flat-fee or premium pricing.</text:p>
        </text:list-item>
        <text:list-item>
          <text:p text:style-name="P20"><text:span text:style-name="Emphasis">Pros:</text:span> Transparent hourly model.</text:p>
        </text:list-item>
        <text:list-item>
          <text:p text:style-name="P20"><text:span text:style-name="Emphasis">Cons:</text:span> Price unpredictability and fee opacity.</text:p>
        </text:list-item>
        <text:list-item>
          <text:p text:style-name="P20"><text:span text:style-name="Emphasis">Opportunities:</text:span> Show all-inclusive estimates upfront and support flat-fee pricing.</text:p>
        </text:list-item>
      </text:list>
      <text:p text:style-name="Text_20_body"><text:span text:style-name="Strong_20_Emphasis">THUMBTACK</text:span></text:p>
      <text:list text:style-name="L20">
        <text:list-item>
          <text:p text:style-name="P21"><text:span text:style-name="Emphasis">Clients:</text:span> Free to request quotes. Pricing unclear until responses received.</text:p>
        </text:list-item>
        <text:list-item>
          <text:p text:style-name="P21"><text:span text:style-name="Emphasis">Providers:</text:span> Pay-per-lead model. No control over lead quality. Cannot list prices upfront.</text:p>
        </text:list-item>
        <text:list-item>
          <text:p text:style-name="P21"><text:span text:style-name="Emphasis">Pros:</text:span> No charge to client.</text:p>
        </text:list-item>
        <text:list-item>
          <text:p text:style-name="P21"><text:span text:style-name="Emphasis">Cons:</text:span> Risky lead spending for providers.</text:p>
        </text:list-item>
        <text:list-item>
          <text:p text:style-name="P21"><text:span text:style-name="Emphasis">Opportunities:</text:span> Introduce hybrid lead + commission model; auto-quote suggestions.</text:p>
        </text:list-item>
      </text:list>
      <text:p text:style-name="Text_20_body"><text:span text:style-name="Strong_20_Emphasis">URBAN COMPANY</text:span></text:p>
      <text:list text:style-name="L21">
        <text:list-item>
          <text:p text:style-name="P22"><text:span text:style-name="Emphasis">Clients:</text:span> Transparent fixed pricing. Extra charges may be added post-booking.</text:p>
        </text:list-item>
        <text:list-item>
          <text:p text:style-name="P22"><text:span text:style-name="Emphasis">Providers:</text:span> Earnings reduced by high commissions. Limited pricing control.</text:p>
        </text:list-item>
        <text:list-item>
          <text:p text:style-name="P22"><text:span text:style-name="Emphasis">Pros:</text:span> Clear for clients.</text:p>
        </text:list-item>
        <text:list-item>
          <text:p text:style-name="P22"><text:span text:style-name="Emphasis">Cons:</text:span> Providers cannot upsell or adjust pricing.</text:p>
        </text:list-item>
        <text:list-item>
          <text:p text:style-name="P22"><text:span text:style-name="Emphasis">Opportunities:</text:span> Enable dynamic pricing and provider bidding in flexible categories.</text:p>
        </text:list-item>
      </text:list>
      <text:p text:style-name="Text_20_body"><text:span text:style-name="Strong_20_Emphasis">HOUSECALL PRO</text:span></text:p>
      <text:list text:style-name="L22">
        <text:list-item>
          <text:p text:style-name="P23"><text:span text:style-name="Emphasis">Clients:</text:span> Transparent via business invoices. No platform-level pricing.</text:p>
        </text:list-item>
        <text:list-item>
          <text:p text:style-name="P23"><text:span text:style-name="Emphasis">Providers:</text:span> Subscription-based. Must upgrade for full features. Keeps 100% of client charges (minus processing fees).</text:p>
        </text:list-item>
        <text:list-item>
          <text:p text:style-name="P23"><text:span text:style-name="Emphasis">Pros:</text:span> Full control over pricing.</text:p>
        </text:list-item>
        <text:list-item>
          <text:p text:style-name="P23"><text:span text:style-name="Emphasis">Cons:</text:span> Costs rise with feature needs.</text:p>
        </text:list-item>
        <text:list-item>
          <text:p text:style-name="P23"><text:span text:style-name="Emphasis">Opportunities:</text:span> Modular billing tiers or pay-as-you-go features.</text:p>
        </text:list-item>
      </text:list>
      <text:p text:style-name="Text_20_body"><text:span text:style-name="Strong_20_Emphasis">PRICING MODEL &amp; TRANSPARENCY</text:span></text:p>
      <text:p text:style-name="Text_20_body"><text:span text:style-name="Strong_20_Emphasis">MOWSNOWPROS</text:span></text:p>
      <text:list text:style-name="L23">
        <text:list-item>
          <text:p text:style-name="P24">• <text:span text:style-name="Strong_20_Emphasis">Pros:</text:span> Customer sees and sets price up front with guided price suggestion.</text:p>
        </text:list-item>
        <text:list-item>
          <text:p text:style-name="P24">• <text:span text:style-name="Strong_20_Emphasis">Cons:</text:span> Providers cannot set rates; pricing can be too low for effort required.</text:p>
        </text:list-item>
        <text:list-item>
          <text:p text:style-name="P24">• <text:span text:style-name="Strong_20_Emphasis">Opportunities:</text:span> Allow pro bidding, sliding scale pricing, and service package options.</text:p>
        </text:list-item>
      </text:list>
      <text:p text:style-name="Text_20_body"><text:soft-page-break/><text:span text:style-name="Strong_20_Emphasis">THEBESTCALGARY.COM</text:span></text:p>
      <text:list text:style-name="L24">
        <text:list-item>
          <text:p text:style-name="P25">• <text:span text:style-name="Strong_20_Emphasis">Pros:</text:span> Pricing insights included in editorial content.</text:p>
        </text:list-item>
        <text:list-item>
          <text:p text:style-name="P25">• <text:span text:style-name="Strong_20_Emphasis">Cons:</text:span> No real-time pricing or booking flows.</text:p>
        </text:list-item>
        <text:list-item>
          <text:p text:style-name="P25">• <text:span text:style-name="Strong_20_Emphasis">Opportunities:</text:span> Add quote generators, pricing calculators, and affiliate integration with booking/payment tools.</text:p>
        </text:list-item>
      </text:list>
      <text:p text:style-name="Text_20_body"/>
      <text:p text:style-name="Text_20_body"><text:span text:style-name="Strong_20_Emphasis">COMMUNICATION TOOLS</text:span></text:p>
      <text:p text:style-name="Text_20_body"><text:span text:style-name="Strong_20_Emphasis">TASKRABBIT</text:span></text:p>
      <text:list text:style-name="L25">
        <text:list-item>
          <text:p text:style-name="P26"><text:span text:style-name="Emphasis">Clients &amp; Providers:</text:span> Chat opens after booking. No pre-booking messages. No voice/video support.</text:p>
        </text:list-item>
        <text:list-item>
          <text:p text:style-name="P26"><text:span text:style-name="Emphasis">Pros:</text:span> Clean and simple.</text:p>
        </text:list-item>
        <text:list-item>
          <text:p text:style-name="P26"><text:span text:style-name="Emphasis">Cons:</text:span> Lack of pre-task clarity.</text:p>
        </text:list-item>
        <text:list-item>
          <text:p text:style-name="P26"><text:span text:style-name="Emphasis">Opportunities:</text:span> Enable pre-hire Q&amp;A chat and richer messaging tools.</text:p>
        </text:list-item>
      </text:list>
      <text:p text:style-name="Text_20_body"><text:span text:style-name="Strong_20_Emphasis">THUMBTACK</text:span></text:p>
      <text:list text:style-name="L26">
        <text:list-item>
          <text:p text:style-name="P27"><text:span text:style-name="Emphasis">Clients &amp; Providers:</text:span> Pre-hire chat enabled. No voice/video. File/image sharing supported.</text:p>
        </text:list-item>
        <text:list-item>
          <text:p text:style-name="P27"><text:span text:style-name="Emphasis">Pros:</text:span> Full pre-hire dialogue.</text:p>
        </text:list-item>
        <text:list-item>
          <text:p text:style-name="P27"><text:span text:style-name="Emphasis">Cons:</text:span> No integrated calling or file versioning.</text:p>
        </text:list-item>
        <text:list-item>
          <text:p text:style-name="P27"><text:span text:style-name="Emphasis">Opportunities:</text:span> Add quick quote templates and real-time call/chat button.</text:p>
        </text:list-item>
      </text:list>
      <text:p text:style-name="Text_20_body"><text:span text:style-name="Strong_20_Emphasis">URBAN COMPANY</text:span></text:p>
      <text:list text:style-name="L27">
        <text:list-item>
          <text:p text:style-name="P28"><text:span text:style-name="Emphasis">Clients &amp; Providers:</text:span> Rich post-booking chat. Pre-booking limited to quote categories. No voice/video.</text:p>
        </text:list-item>
        <text:list-item>
          <text:p text:style-name="P28"><text:span text:style-name="Emphasis">Pros:</text:span> Localized prompts, text-to-speech.</text:p>
        </text:list-item>
        <text:list-item>
          <text:p text:style-name="P28"><text:span text:style-name="Emphasis">Cons:</text:span> Locked messaging until booking in fixed-price workflows.</text:p>
        </text:list-item>
        <text:list-item>
          <text:p text:style-name="P28"><text:span text:style-name="Emphasis">Opportunities:</text:span> Add open inquiry mode and smarter bot filters.</text:p>
        </text:list-item>
      </text:list>
      <text:p text:style-name="Text_20_body"><text:span text:style-name="Strong_20_Emphasis">HOUSECALL PRO</text:span></text:p>
      <text:list text:style-name="L28">
        <text:list-item>
          <text:p text:style-name="P29"><text:span text:style-name="Emphasis">Clients &amp; Providers:</text:span> Text/email reminders and follow-ups. No real-time chat unless using add-ons.</text:p>
        </text:list-item>
        <text:list-item>
          <text:p text:style-name="P29"><text:span text:style-name="Emphasis">Pros:</text:span> Integrated with jobs.</text:p>
        </text:list-item>
        <text:list-item>
          <text:p text:style-name="P29"><text:span text:style-name="Emphasis">Cons:</text:span> No persistent chat channel.</text:p>
        </text:list-item>
        <text:list-item>
          <text:p text:style-name="P29"><text:span text:style-name="Emphasis">Opportunities:</text:span> Build live chat, two-way texting, or customer timeline view.</text:p>
        </text:list-item>
      </text:list>
      <text:p text:style-name="Text_20_body"><text:soft-page-break/><text:span text:style-name="Strong_20_Emphasis">MOWSNOWPROS</text:span></text:p>
      <text:list text:style-name="L29">
        <text:list-item>
          <text:p text:style-name="P30">• <text:span text:style-name="Strong_20_Emphasis">Pros:</text:span> Status updates and photo proof create visibility without messaging.</text:p>
        </text:list-item>
        <text:list-item>
          <text:p text:style-name="P30">• <text:span text:style-name="Strong_20_Emphasis">Cons:</text:span> No in-app chat or direct communication; all comments are static.</text:p>
        </text:list-item>
        <text:list-item>
          <text:p text:style-name="P30">• <text:span text:style-name="Strong_20_Emphasis">Opportunities:</text:span> Add real-time messaging, voice call masking, and task clarification prompts.</text:p>
        </text:list-item>
      </text:list>
      <text:p text:style-name="Text_20_body"><text:span text:style-name="Strong_20_Emphasis">THEBESTCALGARY.COM</text:span></text:p>
      <text:list text:style-name="L30">
        <text:list-item>
          <text:p text:style-name="P31">• <text:span text:style-name="Strong_20_Emphasis">Pros:</text:span> Editorial contact info simplifies initial outreach.</text:p>
        </text:list-item>
        <text:list-item>
          <text:p text:style-name="P31">• <text:span text:style-name="Strong_20_Emphasis">Cons:</text:span> No chat, inquiry form, or messaging system.</text:p>
        </text:list-item>
        <text:list-item>
          <text:p text:style-name="P31">• <text:span text:style-name="Strong_20_Emphasis">Opportunities:</text:span> Add “Request Info” form, verified Q&amp;A, or direct-to-provider contact layer.</text:p>
        </text:list-item>
      </text:list>
      <text:p text:style-name="Text_20_body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TRUST, SAFETY &amp; REVIEWS</text:span></text:p>
      <text:p text:style-name="Text_20_body"><text:span text:style-name="Strong_20_Emphasis">TASKRABBIT</text:span></text:p>
      <text:list text:style-name="L31">
        <text:list-item>
          <text:p text:style-name="P32"><text:span text:style-name="Emphasis">Pros:</text:span> Mandatory background checks for Taskers.</text:p>
        </text:list-item>
        <text:list-item>
          <text:p text:style-name="P32"><text:span text:style-name="Emphasis">Cons:</text:span> No insurance, no client vetting.</text:p>
        </text:list-item>
        <text:list-item>
          <text:p text:style-name="P32"><text:span text:style-name="Emphasis">Opportunities:</text:span> Add rating system for clients and optional damage protection.</text:p>
        </text:list-item>
      </text:list>
      <text:p text:style-name="Text_20_body"><text:span text:style-name="Strong_20_Emphasis">THUMBTACK</text:span></text:p>
      <text:list text:style-name="L32">
        <text:list-item>
          <text:p text:style-name="P33"><text:span text:style-name="Emphasis">Pros:</text:span> Badge system for verified providers.</text:p>
        </text:list-item>
        <text:list-item>
          <text:p text:style-name="P33"><text:span text:style-name="Emphasis">Cons:</text:span> No mandatory checks. Weak claim resolution.</text:p>
        </text:list-item>
        <text:list-item>
          <text:p text:style-name="P33"><text:span text:style-name="Emphasis">Opportunities:</text:span> Automate refund logic and enforce review standards.</text:p>
        </text:list-item>
      </text:list>
      <text:p text:style-name="Text_20_body"><text:span text:style-name="Strong_20_Emphasis">URBAN COMPANY</text:span></text:p>
      <text:list text:style-name="L33">
        <text:list-item>
          <text:p text:style-name="P34"><text:span text:style-name="Emphasis">Pros:</text:span> Training, insurance, and minimum rating enforcement.</text:p>
        </text:list-item>
        <text:list-item>
          <text:p text:style-name="P34"><text:span text:style-name="Emphasis">Cons:</text:span> Rigid penalties and poor client claim handling.</text:p>
        </text:list-item>
        <text:list-item>
          <text:p text:style-name="P34"><text:span text:style-name="Emphasis">Opportunities:</text:span> Add provider-side escalation tools and rating appeals.</text:p>
        </text:list-item>
      </text:list>
      <text:p text:style-name="Text_20_body"><text:span text:style-name="Strong_20_Emphasis">HOUSECALL PRO</text:span></text:p>
      <text:list text:style-name="L34">
        <text:list-item>
          <text:p text:style-name="P35"><text:span text:style-name="Emphasis">Pros:</text:span> Neutral tool—business controls everything.</text:p>
        </text:list-item>
        <text:list-item>
          <text:p text:style-name="P35"><text:span text:style-name="Emphasis">Cons:</text:span> No native trust mechanism.</text:p>
        </text:list-item>
        <text:list-item>
          <text:p text:style-name="P35"><text:span text:style-name="Emphasis">Opportunities:</text:span> Offer opt-in verification and rating aggregation widgets.</text:p>
        </text:list-item>
      </text:list>
      <text:p text:style-name="Text_20_body"><text:soft-page-break/><text:span text:style-name="Strong_20_Emphasis">MOWSNOWPROS</text:span></text:p>
      <text:list text:style-name="L35">
        <text:list-item>
          <text:p text:style-name="P36">• <text:span text:style-name="Strong_20_Emphasis">Pros:</text:span> Photo evidence and post-job rating enforce basic quality.</text:p>
        </text:list-item>
        <text:list-item>
          <text:p text:style-name="P36">• <text:span text:style-name="Strong_20_Emphasis">Cons:</text:span> No insurance guarantees, bonding, or public review profiles.</text:p>
        </text:list-item>
        <text:list-item>
          <text:p text:style-name="P36">• <text:span text:style-name="Strong_20_Emphasis">Opportunities:</text:span> Add verified profiles, safety coverage, dispute resolution, and two-way reviews.</text:p>
        </text:list-item>
      </text:list>
      <text:p text:style-name="Text_20_body"><text:span text:style-name="Strong_20_Emphasis">THEBESTCALGARY.COM</text:span></text:p>
      <text:list text:style-name="L36">
        <text:list-item>
          <text:p text:style-name="P37">• <text:span text:style-name="Strong_20_Emphasis">Pros:</text:span> Reviews curated by editors for consistency.</text:p>
        </text:list-item>
        <text:list-item>
          <text:p text:style-name="P37">• <text:span text:style-name="Strong_20_Emphasis">Cons:</text:span> No real-time customer feedback or update cycle.</text:p>
        </text:list-item>
        <text:list-item>
          <text:p text:style-name="P37">• <text:span text:style-name="Strong_20_Emphasis">Opportunities:</text:span> Add review aggregation, badge system, and live score tracking for providers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pan text:style-name="Strong_20_Emphasis">PAYMENTS &amp; FEES</text:span></text:p>
      <text:p text:style-name="Text_20_body"><text:span text:style-name="Strong_20_Emphasis">TASKRABBIT</text:span></text:p>
      <text:list text:style-name="L37">
        <text:list-item>
          <text:p text:style-name="P38"><text:span text:style-name="Emphasis">Pros:</text:span> Instant payout after task.</text:p>
        </text:list-item>
        <text:list-item>
          <text:p text:style-name="P38"><text:span text:style-name="Emphasis">Cons:</text:span> High client fees, inflexible adjustments.</text:p>
        </text:list-item>
        <text:list-item>
          <text:p text:style-name="P38"><text:span text:style-name="Emphasis">Opportunities:</text:span> Add partial billing, add-on pricing tools.</text:p>
        </text:list-item>
      </text:list>
      <text:p text:style-name="Text_20_body"><text:span text:style-name="Strong_20_Emphasis">THUMBTACK</text:span></text:p>
      <text:list text:style-name="L38">
        <text:list-item>
          <text:p text:style-name="P39"><text:span text:style-name="Emphasis">Pros:</text:span> Free for clients.</text:p>
        </text:list-item>
        <text:list-item>
          <text:p text:style-name="P39"><text:span text:style-name="Emphasis">Cons:</text:span> Leads cost upfront regardless of result.</text:p>
        </text:list-item>
        <text:list-item>
          <text:p text:style-name="P39"><text:span text:style-name="Emphasis">Opportunities:</text:span> Switch to result-based pricing or lead scoring system.</text:p>
        </text:list-item>
      </text:list>
      <text:p text:style-name="Text_20_body"><text:span text:style-name="Strong_20_Emphasis">URBAN COMPANY</text:span></text:p>
      <text:list text:style-name="L39">
        <text:list-item>
          <text:p text:style-name="P40"><text:span text:style-name="Emphasis">Pros:</text:span> Upfront pricing.</text:p>
        </text:list-item>
        <text:list-item>
          <text:p text:style-name="P40"><text:span text:style-name="Emphasis">Cons:</text:span> Providers can’t upsell or negotiate.</text:p>
        </text:list-item>
        <text:list-item>
          <text:p text:style-name="P40"><text:span text:style-name="Emphasis">Opportunities:</text:span> Add in-app tipping and adjustable service pricing.</text:p>
        </text:list-item>
      </text:list>
      <text:p text:style-name="Text_20_body"><text:span text:style-name="Strong_20_Emphasis">HOUSECALL PRO</text:span></text:p>
      <text:list text:style-name="L40">
        <text:list-item>
          <text:p text:style-name="P41"><text:span text:style-name="Emphasis">Pros:</text:span> Business keeps full revenue.</text:p>
        </text:list-item>
        <text:list-item>
          <text:p text:style-name="P41"><text:span text:style-name="Emphasis">Cons:</text:span> No built-in consumer finance or alternate methods.</text:p>
        </text:list-item>
        <text:list-item>
          <text:p text:style-name="P41"><text:soft-page-break/><text:span text:style-name="Emphasis">Opportunities:</text:span> Add buy-now-pay-later and flexible deposit tools.</text:p>
        </text:list-item>
      </text:list>
      <text:p text:style-name="Text_20_body"><text:span text:style-name="Strong_20_Emphasis">USER INTERFACE &amp; EXPERIENCE</text:span></text:p>
      <text:p text:style-name="Text_20_body"><text:span text:style-name="Strong_20_Emphasis">TASKRABBIT</text:span></text:p>
      <text:list text:style-name="L41">
        <text:list-item>
          <text:p text:style-name="P42"><text:span text:style-name="Emphasis">Pros:</text:span> Quick task booking.</text:p>
        </text:list-item>
        <text:list-item>
          <text:p text:style-name="P42"><text:span text:style-name="Emphasis">Cons:</text:span> No power-user support.</text:p>
        </text:list-item>
        <text:list-item>
          <text:p text:style-name="P42"><text:span text:style-name="Emphasis">Opportunities:</text:span> Map clustering, repeat task flows, better filters.</text:p>
        </text:list-item>
      </text:list>
      <text:p text:style-name="Text_20_body"><text:span text:style-name="Strong_20_Emphasis">THUMBTACK</text:span></text:p>
      <text:list text:style-name="L42">
        <text:list-item>
          <text:p text:style-name="P43"><text:span text:style-name="Emphasis">Pros:</text:span> Modern UI.</text:p>
        </text:list-item>
        <text:list-item>
          <text:p text:style-name="P43"><text:span text:style-name="Emphasis">Cons:</text:span> Overwhelming inbox and lead targeting confusion.</text:p>
        </text:list-item>
        <text:list-item>
          <text:p text:style-name="P43"><text:span text:style-name="Emphasis">Opportunities:</text:span> Summarized quote dashboard, visual lead filtering.</text:p>
        </text:list-item>
      </text:list>
      <text:p text:style-name="Text_20_body"><text:span text:style-name="Strong_20_Emphasis">URBAN COMPANY</text:span></text:p>
      <text:list text:style-name="L43">
        <text:list-item>
          <text:p text:style-name="P44"><text:span text:style-name="Emphasis">Pros:</text:span> App-like speed.</text:p>
        </text:list-item>
        <text:list-item>
          <text:p text:style-name="P44"><text:span text:style-name="Emphasis">Cons:</text:span> No multi-book or personalization.</text:p>
        </text:list-item>
        <text:list-item>
          <text:p text:style-name="P44"><text:span text:style-name="Emphasis">Opportunities:</text:span> Batch orders, memory-based suggestions.</text:p>
        </text:list-item>
      </text:list>
      <text:p text:style-name="Text_20_body"><text:span text:style-name="Strong_20_Emphasis">HOUSECALL PRO</text:span></text:p>
      <text:list text:style-name="L44">
        <text:list-item>
          <text:p text:style-name="P45"><text:span text:style-name="Emphasis">Pros:</text:span> Admin and field apps.</text:p>
        </text:list-item>
        <text:list-item>
          <text:p text:style-name="P45"><text:span text:style-name="Emphasis">Cons:</text:span> Outdated web UI, weak internal search.</text:p>
        </text:list-item>
        <text:list-item>
          <text:p text:style-name="P45"><text:span text:style-name="Emphasis">Opportunities:</text:span> Dashboard redesign, global search, invoice chat thread.</text:p>
        </text:list-item>
      </text:list>
      <text:p text:style-name="Text_20_body"><text:span text:style-name="Strong_20_Emphasis">MOWSNOWPROS</text:span></text:p>
      <text:list text:style-name="L45">
        <text:list-item>
          <text:p text:style-name="P46">• <text:span text:style-name="Strong_20_Emphasis">Pros:</text:span> Auto-charge post-service, zero-cash model.</text:p>
        </text:list-item>
        <text:list-item>
          <text:p text:style-name="P46">• <text:span text:style-name="Strong_20_Emphasis">Cons:</text:span> No pricing breakdown or earnings clarity for pros.</text:p>
        </text:list-item>
        <text:list-item>
          <text:p text:style-name="P46">• <text:span text:style-name="Strong_20_Emphasis">Opportunities:</text:span> Add tip suggestions, dynamic bonuses, and invoice transparency.</text:p>
        </text:list-item>
      </text:list>
      <text:p text:style-name="Text_20_body"><text:span text:style-name="Strong_20_Emphasis">THEBESTCALGARY.COM</text:span></text:p>
      <text:list text:style-name="L46">
        <text:list-item>
          <text:p text:style-name="P47">• <text:span text:style-name="Strong_20_Emphasis">Pros:</text:span> No cost to user; no hidden platform fees.</text:p>
        </text:list-item>
        <text:list-item>
          <text:p text:style-name="P47">• <text:span text:style-name="Strong_20_Emphasis">Cons:</text:span> No payment functionality.</text:p>
        </text:list-item>
        <text:list-item>
          <text:p text:style-name="P47">• <text:span text:style-name="Strong_20_Emphasis">Opportunities:</text:span> Introduce affiliate-enabled payment links or form-fill quote systems.</text:p>
        </text:list-item>
      </text:list>
      <text:p text:style-name="Text_20_body"/>
      <text:p text:style-name="Text_20_body"><text:span text:style-name="Strong_20_Emphasis">GEOGRAPHIC &amp; CATEGORY LIMITATIONS</text:span></text:p>
      <text:p text:style-name="Text_20_body"><text:soft-page-break/><text:span text:style-name="Strong_20_Emphasis">TASKRABBIT</text:span></text:p>
      <text:list text:style-name="L47">
        <text:list-item>
          <text:p text:style-name="P48"><text:span text:style-name="Emphasis">Pros:</text:span> Major cities in multiple countries.</text:p>
        </text:list-item>
        <text:list-item>
          <text:p text:style-name="P48"><text:span text:style-name="Emphasis">Cons:</text:span> Only standard home tasks.</text:p>
        </text:list-item>
        <text:list-item>
          <text:p text:style-name="P48"><text:span text:style-name="Emphasis">Opportunities:</text:span> Expand categories and rural coverage.</text:p>
        </text:list-item>
      </text:list>
      <text:p text:style-name="Text_20_body"><text:span text:style-name="Strong_20_Emphasis">THUMBTACK</text:span></text:p>
      <text:list text:style-name="L48">
        <text:list-item>
          <text:p text:style-name="P49"><text:span text:style-name="Emphasis">Pros:</text:span> Broad category set in US.</text:p>
        </text:list-item>
        <text:list-item>
          <text:p text:style-name="P49"><text:span text:style-name="Emphasis">Cons:</text:span> No global ops.</text:p>
        </text:list-item>
        <text:list-item>
          <text:p text:style-name="P49"><text:span text:style-name="Emphasis">Opportunities:</text:span> Enable export presence or white-label partner abroad.</text:p>
        </text:list-item>
      </text:list>
      <text:p text:style-name="Text_20_body"><text:span text:style-name="Strong_20_Emphasis">URBAN COMPANY</text:span></text:p>
      <text:list text:style-name="L49">
        <text:list-item>
          <text:p text:style-name="P50"><text:span text:style-name="Emphasis">Pros:</text:span> Strong in India/MENA.</text:p>
        </text:list-item>
        <text:list-item>
          <text:p text:style-name="P50"><text:span text:style-name="Emphasis">Cons:</text:span> Not in EU/US; narrow category list.</text:p>
        </text:list-item>
        <text:list-item>
          <text:p text:style-name="P50"><text:span text:style-name="Emphasis">Opportunities:</text:span> Regional expansions and pro-level service inclusion.</text:p>
        </text:list-item>
      </text:list>
      <text:p text:style-name="Text_20_body"><text:span text:style-name="Strong_20_Emphasis">HOUSECALL PRO</text:span></text:p>
      <text:list xml:id="list3074566723" text:style-name="L50">
        <text:list-item>
          <text:p text:style-name="P51"><text:span text:style-name="Emphasis">Pros:</text:span> Trades-focused across US/Canada.</text:p>
        </text:list-item>
        <text:list-item>
          <text:p text:style-name="P51"><text:span text:style-name="Emphasis">Cons:</text:span> English-only, no multi-location business ops.</text:p>
        </text:list-item>
        <text:list-item>
          <text:p text:style-name="P51"><text:span text:style-name="Emphasis">Opportunities:</text:span> Add global currency, language, and franchising modules.</text:p>
        </text:list-item>
        <text:list-item>
          <text:p text:style-name="P51"><text:span text:style-name="Strong_20_Emphasis">MOWSNOWPROS</text:span></text:p>
        </text:list-item>
        <text:list-item text:style-override="L51">
          <text:p text:style-name="P52">• <text:span text:style-name="Strong_20_Emphasis">Pros:</text:span> Operates in Canadian prairie cities; hyper-focused on yard services.</text:p>
        </text:list-item>
        <text:list-item text:style-override="L51">
          <text:p text:style-name="P52">• <text:span text:style-name="Strong_20_Emphasis">Cons:</text:span> No coverage in Eastern Canada, BC, or outside Canada; limited to lawn and snow tasks only.</text:p>
        </text:list-item>
        <text:list-item text:style-override="L51">
          <text:p text:style-name="P52">• Opportunities:** Expand to new regions and add adjacent services (e.g., leaf cleanup, exterior cleaning, basic landscaping).</text:p>
        </text:list-item>
      </text:list>
      <text:p text:style-name="Text_20_body"><text:span text:style-name="Strong_20_Emphasis">THEBESTCALGARY.COM</text:span></text:p>
      <text:list text:style-name="L52">
        <text:list-item>
          <text:p text:style-name="P53">• <text:span text:style-name="Strong_20_Emphasis">Pros:</text:span> Deep coverage of local businesses across many service verticals.</text:p>
        </text:list-item>
        <text:list-item>
          <text:p text:style-name="P53">• <text:span text:style-name="Strong_20_Emphasis">Cons:</text:span> Calgary-only; static lists restrict scale; no real-time or national footprint.</text:p>
        </text:list-item>
        <text:list-item>
          <text:p text:style-name="P53">• <text:span text:style-name="Strong_20_Emphasis">Opportunities:</text:span> Build a templated expansion model for other cities or license editorial + directory format as a white-label product.</text:p>
        </text:list-item>
      </text:list>
      <text:list text:continue-list="list3074566723" text:style-name="L50">
        <text:list-header>
          <text:p text:style-name="P51"/>
        </text:list-header>
      </text:list>
      <text:p text:style-name="Text_20_body"/>
      <text:p text:style-name="Text_20_body"><text:soft-page-break/></text:p>
      <text:p text:style-name="Text_20_body"><text:span text:style-name="Strong_20_Emphasis">SECURITY &amp; INTEGRATIONS</text:span></text:p>
      <text:p text:style-name="Text_20_body"><text:span text:style-name="Strong_20_Emphasis">TASKRABBIT</text:span></text:p>
      <text:list text:style-name="L53">
        <text:list-item>
          <text:p text:style-name="P54"><text:span text:style-name="Emphasis">Pros:</text:span> Stable post-breach.</text:p>
        </text:list-item>
        <text:list-item>
          <text:p text:style-name="P54"><text:span text:style-name="Emphasis">Cons:</text:span> No 2FA or external integrations.</text:p>
        </text:list-item>
        <text:list-item>
          <text:p text:style-name="P54"><text:span text:style-name="Emphasis">Opportunities:</text:span> Calendar sync, invoice exports, API layer.</text:p>
        </text:list-item>
      </text:list>
      <text:p text:style-name="Text_20_body"><text:span text:style-name="Strong_20_Emphasis">THUMBTACK</text:span></text:p>
      <text:list text:style-name="L54">
        <text:list-item>
          <text:p text:style-name="P55"><text:span text:style-name="Emphasis">Pros:</text:span> Lead-gen focused.</text:p>
        </text:list-item>
        <text:list-item>
          <text:p text:style-name="P55"><text:span text:style-name="Emphasis">Cons:</text:span> Weak protection for providers.</text:p>
        </text:list-item>
        <text:list-item>
          <text:p text:style-name="P55"><text:span text:style-name="Emphasis">Opportunities:</text:span> Add CRM hooks and abuse flagging.</text:p>
        </text:list-item>
      </text:list>
      <text:p text:style-name="Text_20_body"><text:span text:style-name="Strong_20_Emphasis">URBAN COMPANY</text:span></text:p>
      <text:list text:style-name="L55">
        <text:list-item>
          <text:p text:style-name="P56"><text:span text:style-name="Emphasis">Pros:</text:span> Lockdown ecosystem.</text:p>
        </text:list-item>
        <text:list-item>
          <text:p text:style-name="P56"><text:span text:style-name="Emphasis">Cons:</text:span> Providers can’t export data or build outside presence.</text:p>
        </text:list-item>
        <text:list-item>
          <text:p text:style-name="P56"><text:span text:style-name="Emphasis">Opportunities:</text:span> Add partner dashboard with analytics and export tools.</text:p>
        </text:list-item>
      </text:list>
      <text:p text:style-name="Text_20_body"><text:span text:style-name="Strong_20_Emphasis">HOUSECALL PRO</text:span></text:p>
      <text:list text:style-name="L56">
        <text:list-item>
          <text:p text:style-name="P57"><text:span text:style-name="Emphasis">Pros:</text:span> Integration-rich with QuickBooks, Zapier.</text:p>
        </text:list-item>
        <text:list-item>
          <text:p text:style-name="P57"><text:span text:style-name="Emphasis">Cons:</text:span> Data access limited, no user-defined roles.</text:p>
        </text:list-item>
        <text:list-item>
          <text:p text:style-name="P57"><text:span text:style-name="Emphasis">Opportunities:</text:span> Add open API, enterprise-grade permissioning, and backup export tools.</text:p>
        </text:list-item>
      </text:list>
      <text:p text:style-name="Text_20_body"><text:span text:style-name="Strong_20_Emphasis">MOWSNOWPROS</text:span></text:p>
      <text:list text:style-name="L57">
        <text:list-item>
          <text:p text:style-name="P58">• <text:span text:style-name="Strong_20_Emphasis">Pros:</text:span> Streamlined internal automation for job dispatch and weather-based triggers.</text:p>
        </text:list-item>
        <text:list-item>
          <text:p text:style-name="P58">• <text:span text:style-name="Strong_20_Emphasis">Cons:</text:span> No 2FA, no client privacy masking, no external app/calendar/accounting integrations.</text:p>
        </text:list-item>
        <text:list-item>
          <text:p text:style-name="P58">• <text:span text:style-name="Strong_20_Emphasis">Opportunities:</text:span> Add secure messaging, bank-grade authentication, contractor license verification, and sync options (Google Calendar, QuickBooks).</text:p>
        </text:list-item>
      </text:list>
      <text:p text:style-name="Text_20_body"><text:span text:style-name="Strong_20_Emphasis">THEBESTCALGARY.COM</text:span></text:p>
      <text:list text:style-name="L58">
        <text:list-item>
          <text:p text:style-name="P59">• <text:span text:style-name="Strong_20_Emphasis">Pros:</text:span> No user data stored (no accounts); no security risk for users.</text:p>
        </text:list-item>
        <text:list-item>
          <text:p text:style-name="P59">• <text:span text:style-name="Strong_20_Emphasis">Cons:</text:span> No integrations, no APIs, no real-time validation or trust layers.</text:p>
        </text:list-item>
        <text:list-item>
          <text:p text:style-name="P59">• <text:span text:style-name="Strong_20_Emphasis">Opportunities:</text:span> Add provider dashboards, partner APIs for lead routing, or dynamic review embedding via third-party sources (e.g., Google Reviews, Yelp).</text:p>
        </text:list-item>
      </text:list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8eda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12"/><text:span text:style-name="MT1"><text:s text:c="2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6:23:03.451310400</meta:creation-date>
    <dc:date>2025-12-11T23:37:12.495621800</dc:date>
    <meta:editing-duration>PT1H10M6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12" meta:paragraph-count="282" meta:word-count="2162" meta:character-count="14697" meta:non-whitespace-character-count="12989"/>
  </office:meta>
</office:document-meta>
</file>