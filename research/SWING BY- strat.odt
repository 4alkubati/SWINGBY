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SWINGBY STRATEGIC ADVANTAGE – PROS BY DESIGN CATEGORY</text:span></text:p>
      <text:p text:style-name="Text_20_body"><text:span text:style-name="Strong_20_Emphasis">ONBOARDING &amp; VERIFICATION</text:span></text:p>
      <text:list text:style-name="L1">
        <text:list-item>
          <text:p text:style-name="P1">Dual-verification: ID verification for both clients and providers.</text:p>
        </text:list-item>
        <text:list-item>
          <text:p text:style-name="P1">Skill &amp; certification tagging during provider signup.</text:p>
        </text:list-item>
        <text:list-item>
          <text:p text:style-name="P1">Optional client review scoring for future trust metrics.</text:p>
        </text:list-item>
        <text:list-item>
          <text:p text:style-name="P1">Fast-track onboarding for licensed/verified professionals.</text:p>
        </text:list-item>
      </text:list>
      <text:p text:style-name="Text_20_body"><text:span text:style-name="Strong_20_Emphasis">SERVICE DISCOVERY &amp; FILTERING</text:span></text:p>
      <text:list text:style-name="L2">
        <text:list-item>
          <text:p text:style-name="P2">Real-time discovery with advanced filters (skills, certifications, availability, language).</text:p>
        </text:list-item>
        <text:list-item>
          <text:p text:style-name="P2">Keyword and AI-driven search for specific tasks or outcomes.</text:p>
        </text:list-item>
        <text:list-item>
          <text:p text:style-name="P2">Niche-friendly listing system—freedom for providers to define services.</text:p>
        </text:list-item>
        <text:list-item>
          <text:p text:style-name="P2">Smart sorting: Top rated, most responsive, nearby, verified-only.</text:p>
        </text:list-item>
      </text:list>
      <text:p text:style-name="Text_20_body"><text:span text:style-name="Strong_20_Emphasis">BOOKING &amp; SCHEDULING</text:span></text:p>
      <text:list text:style-name="L3">
        <text:list-item>
          <text:p text:style-name="P3">Instant and scheduled booking.</text:p>
        </text:list-item>
        <text:list-item>
          <text:p text:style-name="P3">Recurring task workflows (e.g. weekly cleaning).</text:p>
        </text:list-item>
        <text:list-item>
          <text:p text:style-name="P3">Calendar sync (Google, Outlook) for both client and provider.</text:p>
        </text:list-item>
        <text:list-item>
          <text:p text:style-name="P3">Multi-task bundling in a single session (cleaning + repairs).</text:p>
        </text:list-item>
        <text:list-item>
          <text:p text:style-name="P3">Dynamic availability blocking and technician auto-routing.</text:p>
        </text:list-item>
      </text:list>
      <text:p text:style-name="Text_20_body"><text:span text:style-name="Strong_20_Emphasis">PRICING MODEL &amp; TRANSPARENCY</text:span></text:p>
      <text:list text:style-name="L4">
        <text:list-item>
          <text:p text:style-name="P4">Transparent all-inclusive estimates before booking.</text:p>
        </text:list-item>
        <text:list-item>
          <text:p text:style-name="P4">Flexible pricing: hourly, flat-rate, tiered packages.</text:p>
        </text:list-item>
        <text:list-item>
          <text:p text:style-name="P4">Pre-approved add-ons with visual quote breakdown.</text:p>
        </text:list-item>
        <text:list-item>
          <text:p text:style-name="P4">Built-in tipping system.</text:p>
        </text:list-item>
        <text:list-item>
          <text:p text:style-name="P4">Marketplace fee shown upfront.</text:p>
        </text:list-item>
      </text:list>
      <text:p text:style-name="Text_20_body"><text:span text:style-name="Strong_20_Emphasis">COMMUNICATION TOOLS</text:span></text:p>
      <text:list text:style-name="L5">
        <text:list-item>
          <text:p text:style-name="P5">In-app pre-booking chat with text, voice, image and doc support.</text:p>
        </text:list-item>
        <text:list-item>
          <text:p text:style-name="P5">Optional masked calling pre- and post-booking.</text:p>
        </text:list-item>
        <text:list-item>
          <text:p text:style-name="P5">Live status updates (en route, arrived, completed).</text:p>
        </text:list-item>
        <text:list-item>
          <text:p text:style-name="P5">Saved message templates + auto-replies.</text:p>
        </text:list-item>
        <text:list-item>
          <text:p text:style-name="P5">Real-time support ticketing between users and platform.</text:p>
        </text:list-item>
      </text:list>
      <text:p text:style-name="Text_20_body"><text:span text:style-name="Strong_20_Emphasis">TRUST, SAFETY &amp; REVIEWS</text:span></text:p>
      <text:list text:style-name="L6">
        <text:list-item>
          <text:p text:style-name="P6"><text:soft-page-break/>Two-way rating system (client and provider).</text:p>
        </text:list-item>
        <text:list-item>
          <text:p text:style-name="P6">Verified badges for identity, licenses, and safety training.</text:p>
        </text:list-item>
        <text:list-item>
          <text:p text:style-name="P6">Optional platform-backed damage coverage.</text:p>
        </text:list-item>
        <text:list-item>
          <text:p text:style-name="P6">Escalation flow for disputes with neutral arbitration.</text:p>
        </text:list-item>
        <text:list-item>
          <text:p text:style-name="P6">Repeat behavior tracking (late/cancellation flagging).</text:p>
        </text:list-item>
      </text:list>
      <text:p text:style-name="Text_20_body"><text:span text:style-name="Strong_20_Emphasis">PAYMENTS &amp; FEES</text:span></text:p>
      <text:list text:style-name="L7">
        <text:list-item>
          <text:p text:style-name="P7">Multiple payment options: card, digital wallets, pay-later (BNPL).</text:p>
        </text:list-item>
        <text:list-item>
          <text:p text:style-name="P7">Transparent platform fee display pre-checkout.</text:p>
        </text:list-item>
        <text:list-item>
          <text:p text:style-name="P7">Partial payment + deposit feature.</text:p>
        </text:list-item>
        <text:list-item>
          <text:p text:style-name="P7">Instant payout option for providers.</text:p>
        </text:list-item>
        <text:list-item>
          <text:p text:style-name="P7">Invoice preview and change tracking.</text:p>
        </text:list-item>
      </text:list>
      <text:p text:style-name="Text_20_body"><text:span text:style-name="Strong_20_Emphasis">USER INTERFACE &amp; EXPERIENCE</text:span></text:p>
      <text:list text:style-name="L8">
        <text:list-item>
          <text:p text:style-name="P8">Unified dashboard for both parties (active jobs, history, saved pros).</text:p>
        </text:list-item>
        <text:list-item>
          <text:p text:style-name="P8">Mobile-first, accessibility-aware design.</text:p>
        </text:list-item>
        <text:list-item>
          <text:p text:style-name="P8">Saved searches and favorite providers.</text:p>
        </text:list-item>
        <text:list-item>
          <text:p text:style-name="P8">Provider dashboard includes analytics, conversion tracking.</text:p>
        </text:list-item>
        <text:list-item>
          <text:p text:style-name="P8">Visual workflow tracker (quote &gt; chat &gt; job &gt; review).</text:p>
        </text:list-item>
      </text:list>
      <text:p text:style-name="Text_20_body"><text:span text:style-name="Strong_20_Emphasis">GEOGRAPHIC &amp; CATEGORY COVERAGE</text:span></text:p>
      <text:list text:style-name="L9">
        <text:list-item>
          <text:p text:style-name="P9">Global-ready architecture: multi-language, multi-currency.</text:p>
        </text:list-item>
        <text:list-item>
          <text:p text:style-name="P9">Designed for both metro and semi-rural coverage with geo-pinned demand.</text:p>
        </text:list-item>
        <text:list-item>
          <text:p text:style-name="P9">Category-flexible: from household services to consulting to delivery.</text:p>
        </text:list-item>
        <text:list-item>
          <text:p text:style-name="P9">Region-based service expansion tools.</text:p>
        </text:list-item>
      </text:list>
      <text:p text:style-name="Text_20_body"><text:span text:style-name="Strong_20_Emphasis">SECURITY &amp; INTEGRATIONS</text:span></text:p>
      <text:list text:style-name="L10">
        <text:list-item>
          <text:p text:style-name="P10">Mandatory 2FA for all user accounts.</text:p>
        </text:list-item>
        <text:list-item>
          <text:p text:style-name="P10">OAuth and SSO login options.</text:p>
        </text:list-item>
        <text:list-item>
          <text:p text:style-name="P10">QuickBooks, Google Calendar, Zapier integration native.</text:p>
        </text:list-item>
        <text:list-item>
          <text:p text:style-name="P10">Exportable job and earnings history.</text:p>
        </text:list-item>
        <text:list-item>
          <text:p text:style-name="P10">GDPR and SOC2-level data handling compliance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1T18:25:04.296513100</meta:creation-date>
    <dc:date>2025-12-11T20:52:40.097507700</dc:date>
    <meta:editing-duration>PT2H17M24S</meta:editing-duration>
    <meta:editing-cycles>1</meta:editing-cycles>
    <meta:generator>LibreOffice/25.8.3.2$Windows_X86_64 LibreOffice_project/8ca8d55c161d602844f5428fa4b58097424e324e</meta:generator>
    <meta:document-statistic meta:table-count="0" meta:image-count="0" meta:object-count="0" meta:page-count="2" meta:paragraph-count="58" meta:word-count="390" meta:character-count="2747" meta:non-whitespace-character-count="2462"/>
  </office:meta>
</office:document-meta>
</file>