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0f1e6e"/>
    </style:style>
    <style:style style:name="P2" style:family="paragraph" style:parent-style-name="Text_20_body">
      <style:text-properties officeooo:rsid="000f1e6e"/>
    </style:style>
    <style:style style:name="P3" style:family="paragraph" style:parent-style-name="Text_20_body" style:list-style-name="L1">
      <style:text-properties officeooo:rsid="000f1e6e"/>
    </style:style>
    <style:style style:name="P4" style:family="paragraph" style:parent-style-name="Text_20_body" style:list-style-name="L2">
      <style:text-properties officeooo:rsid="000f1e6e"/>
    </style:style>
    <style:style style:name="P5" style:family="paragraph" style:parent-style-name="Text_20_body" style:list-style-name="L3">
      <style:text-properties officeooo:rsid="000f1e6e"/>
    </style:style>
    <style:style style:name="P6" style:family="paragraph" style:parent-style-name="Text_20_body" style:list-style-name="L4">
      <style:text-properties officeooo:rsid="000f1e6e"/>
    </style:style>
    <style:style style:name="P7" style:family="paragraph" style:parent-style-name="Text_20_body" style:list-style-name="L5">
      <style:text-properties officeooo:rsid="000f1e6e"/>
    </style:style>
    <style:style style:name="P8" style:family="paragraph" style:parent-style-name="Standard">
      <style:paragraph-properties fo:text-align="start" style:justify-single-word="false"/>
      <style:text-properties fo:font-size="12pt" officeooo:rsid="000f1e6e" officeooo:paragraph-rsid="000f1e6e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3pt" style:font-size-asian="11.3500003814697pt" style:font-size-complex="13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officeooo:rsid="001484d8"/>
    </style:style>
    <style:style style:name="T3" style:family="text">
      <style:text-properties fo:font-size="24pt" officeooo:rsid="000f1e6e" style:font-size-asian="24pt" style:font-size-complex="24pt"/>
    </style:style>
    <style:style style:name="T4" style:family="text">
      <style:text-properties officeooo:rsid="000f1e6e"/>
    </style:style>
    <style:style style:name="T5" style:family="text">
      <style:text-properties fo:font-size="24pt" officeooo:rsid="001206fc" style:font-size-asian="24pt" style:font-size-complex="24pt"/>
    </style:style>
    <text:list-style style:name="L1">
      <text:list-level-style-number text:level="1" text:style-name="Numbering_20_Symbols" loext:num-list-format="%1%." style:num-suffix="." style:num-format="1" text:start-value="8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1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18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2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17"/>PLANNING &amp; RESEARCH</text:span><text:line-break/>Which users are primary:<text:line-break/>• Solo contractors and small teams (1–10).</text:p>
      <text:p text:style-name="P2">Top 3 problems the app must solve on day one:<text:line-break/>• Scheduling (bookings &amp; assignments).<text:line-break/>• Invoicing (generate/send invoices).<text:span text:style-name="T2">claude</text:span><text:line-break/>• Check-ins (timestamped photo + time tracking + communication).</text:p>
      <text:p text:style-name="P2">Which 6 features are must-have for MVP:<text:line-break/>• Property CRM, Tickets, Crew check-in, Photos (before/after), PDF invoices, Analytics.</text:p>
      <text:p text:style-name="P2">Geographic launch target:<text:line-break/>• Calgary first → expand Canada-wide.</text:p>
      <text:p text:style-name="P2">Competitors to benchmark:<text:line-break/>• Jobber, Housecall Pro, ServiceTitan, Tradify, Yardbook.</text:p>
      <text:p text:style-name="P2">Success metric at 90 days:<text:line-break/>• 5 paying teams and ~100 daily check-ins (adjustable).</text:p>
      <text:p text:style-name="Text_20_body"><text:span text:style-name="T3"><text:s text:c="16"/>TECHNICAL DECISIONS</text:span><text:span text:style-name="T4"><text:line-break/>7. Platform priority:<text:line-break/>• Fully native mobile (Swift iOS + Kotlin Android) + Web admin for sales/hrs/analytics.</text:span></text:p>
      <text:list text:style-name="L1">
        <text:list-item>
          <text:p text:style-name="P3">Offline photo/check-in sync?<text:line-break/>• No — require live internet (online-only).</text:p>
        </text:list-item>
        <text:list-item>
          <text:p text:style-name="P3">Need realtime features (push / live status)?<text:line-break/>• Yes — push notifications for assignments/updates.</text:p>
        </text:list-item>
        <text:list-item>
          <text:p text:style-name="P3">Backend preference:<text:line-break/>• Open to either; recommended FastAPI (Python) for speed + typed dev.</text:p>
        </text:list-item>
        <text:list-item>
          <text:p text:style-name="P3">Preferred hosting:<text:line-break/>• Your own cloud + managed services as needed (Postgres, S3-compatible storage, Redis). No strict monthly budget provided.</text:p>
        </text:list-item>
        <text:list-item>
          <text:p text:style-name="P3">Payments at launch?<text:line-break/>• No — invoicing only at launch. Stripe payments planned post-MVP.</text:p>
        </text:list-item>
      </text:list>
      <text:p text:style-name="Text_20_body"><text:span text:style-name="T3"><text:s text:c="18"/>DESIGN ASSETS</text:span><text:span text:style-name="T4"><text:line-break/>13. Existing brand assets:<text:line-break/>• None.</text:span></text:p>
      <text:list text:style-name="L2">
        <text:list-item>
          <text:p text:style-name="P4">Visual style preference:<text:line-break/>• Clean, modern.</text:p>
        </text:list-item>
        <text:list-item>
          <text:p text:style-name="P4"><text:soft-page-break/>Required languages/localization at launch:<text:line-break/>• English primary; user-selectable language in settings later.</text:p>
        </text:list-item>
        <text:list-item>
          <text:p text:style-name="P4">Accessibility minimum:<text:line-break/>• Not required for MVP.</text:p>
        </text:list-item>
      </text:list>
      <text:p text:style-name="Text_20_body"><text:span text:style-name="T3"><text:s text:c="9"/>DEVELOPMENT SETUP &amp; TEAM</text:span><text:span text:style-name="T4"><text:line-break/>17. Team available:<text:line-break/>• Solo (you’ll do full-stack).</text:span></text:p>
      <text:list text:style-name="L3">
        <text:list-item>
          <text:p text:style-name="P5">Target MVP timeline:<text:line-break/>• 3–5 months.</text:p>
        </text:list-item>
        <text:list-item>
          <text:p text:style-name="P5">CI/CD preference:<text:line-break/>• None yet.</text:p>
        </text:list-item>
        <text:list-item>
          <text:p text:style-name="P5">App store publishing:<text:line-break/>• Apple + Google (both).</text:p>
        </text:list-item>
      </text:list>
      <text:p text:style-name="Text_20_body"><text:span text:style-name="T3"><text:s text:c="11"/>LEGAL &amp; BUSINESS</text:span><text:span text:style-name="T4"><text:line-break/>21. Business model:<text:line-break/>• Freemium (limited free) + yearly subscription paid tier.</text:span></text:p>
      <text:list text:style-name="L4">
        <text:list-item>
          <text:p text:style-name="P6">Company registered / payments ready:<text:line-break/>• In progress.</text:p>
        </text:list-item>
        <text:list-item>
          <text:p text:style-name="P6">Legal jurisdiction for privacy/TOS:<text:line-break/>• Alberta / Canada (default OK).</text:p>
        </text:list-item>
        <text:list-item>
          <text:p text:style-name="P6">Need legal templates now?<text:line-break/>• Later — draft after data/flow finalized.</text:p>
        </text:list-item>
      </text:list>
      <text:p text:style-name="Text_20_body"><text:span text:style-name="T3"><text:s text:c="12"/></text:span><text:span text:style-name="T5">`</text:span><text:span text:style-name="T3">LAUNCH &amp; GROWTH</text:span><text:span text:style-name="T4"><text:line-break/>25. Beta testing plan:<text:line-break/>• Friends/family + a contractor (small closed beta; target ~5–12 testers).</text:span></text:p>
      <text:list text:style-name="L5">
        <text:list-item>
          <text:p text:style-name="P7">Marketing budget and channels:<text:line-break/>• Organic/social focus + small paid Facebook ads.</text:p>
        </text:list-item>
        <text:list-item>
          <text:p text:style-name="P7">Analytics &amp; error tracking:<text:line-break/>• You’ll build custom analytics; consider Sentry for error tracking (optional).</text:p>
        </text:list-item>
        <text:list-item>
          <text:p text:style-name="P7">Post-launch support:<text:line-break/>• You handle support personally.</text:p>
        </text:list-item>
      </text:list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7T18:47:11.932345800</meta:creation-date>
    <dc:date>2026-01-19T20:25:16.012249200</dc:date>
    <meta:editing-duration>PT3H20M55S</meta:editing-duration>
    <meta:editing-cycles>2</meta:editing-cycles>
    <meta:generator>LibreOffice/25.8.3.2$Windows_X86_64 LibreOffice_project/8ca8d55c161d602844f5428fa4b58097424e324e</meta:generator>
    <meta:document-statistic meta:table-count="0" meta:image-count="0" meta:object-count="0" meta:page-count="3" meta:paragraph-count="28" meta:word-count="360" meta:character-count="2440" meta:non-whitespace-character-count="2041"/>
  </office:meta>
</office:document-meta>
</file>